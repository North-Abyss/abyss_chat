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ourier New" svg:font-family="'Courier New'"/>
    <style:font-face style:name="DejaVu Sans" svg:font-family="'DejaVu Sans'" style:font-family-generic="system"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Times New Roman" svg:font-family="'Times New Roman'"/>
    <style:font-face style:name="Times New Roman1" svg:font-family="'Times New Roman'" style:font-family-generic="roman"/>
  </office:font-face-decls>
  <office:automatic-styles>
    <style:style style:name="Table1" style:family="table" style:master-page-name="">
      <style:table-properties style:width="6.4486in" style:page-number="auto" table:align="margins"/>
    </style:style>
    <style:style style:name="Table1.A" style:family="table-column">
      <style:table-column-properties style:column-width="3.2243in" style:rel-column-width="32767*"/>
    </style:style>
    <style:style style:name="Table1.A1" style:family="table-cell">
      <style:table-cell-properties style:vertical-align="middle" fo:padding="0.0382in" fo:border="none"/>
    </style:style>
    <style:style style:name="P1" style:family="paragraph" style:parent-style-name="Spacer">
      <style:text-properties style:font-name="Times New Roman1"/>
    </style:style>
    <style:style style:name="P2" style:family="paragraph" style:parent-style-name="Cover_5f_Title">
      <style:text-properties style:font-name="Times New Roman1"/>
    </style:style>
    <style:style style:name="P3" style:family="paragraph" style:parent-style-name="Cover_5f_Sub">
      <style:text-properties style:font-name="Times New Roman1"/>
    </style:style>
    <style:style style:name="P4" style:family="paragraph" style:parent-style-name="Cover_5f_Sub">
      <style:text-properties style:font-name="Times New Roman1" fo:font-weight="bold" style:font-weight-asian="bold" style:font-weight-complex="bold"/>
    </style:style>
    <style:style style:name="P5" style:family="paragraph" style:parent-style-name="Cover_5f_Body">
      <style:text-properties style:font-name="Times New Roman1" fo:font-size="14pt" style:font-size-asian="14pt" style:font-size-complex="14pt"/>
    </style:style>
    <style:style style:name="P6" style:family="paragraph" style:parent-style-name="Cover_5f_Body">
      <style:text-properties style:font-name="Times New Roman1" fo:font-size="14pt" fo:font-weight="bold" style:font-size-asian="14pt" style:font-weight-asian="bold" style:font-size-complex="14pt" style:font-weight-complex="bold"/>
    </style:style>
    <style:style style:name="P7" style:family="paragraph" style:parent-style-name="Cover_5f_Body">
      <style:text-properties style:font-name="Times New Roman1"/>
    </style:style>
    <style:style style:name="P8" style:family="paragraph" style:parent-style-name="Cover_5f_Sub">
      <style:text-properties style:font-name="Times New Roman1" fo:font-size="16pt" fo:font-weight="bold" style:font-size-asian="16pt" style:font-weight-asian="bold" style:font-size-complex="16pt" style:font-weight-complex="bold"/>
    </style:style>
    <style:style style:name="P9" style:family="paragraph" style:parent-style-name="Cover_5f_Body">
      <style:text-properties style:font-name="Times New Roman1" fo:font-weight="bold" style:font-weight-asian="bold" style:font-weight-complex="bold"/>
    </style:style>
    <style:style style:name="P10" style:family="paragraph" style:parent-style-name="Page_5f_Break">
      <style:text-properties style:font-name="Times New Roman1"/>
    </style:style>
    <style:style style:name="P11" style:family="paragraph" style:parent-style-name="Body_5f_Text">
      <style:text-properties style:font-name="Times New Roman1" fo:font-size="14pt" style:font-size-asian="14pt" style:font-size-complex="14pt"/>
    </style:style>
    <style:style style:name="P12" style:family="paragraph" style:parent-style-name="Spacer">
      <style:text-properties style:font-name="Times New Roman1" fo:font-size="14pt" style:font-size-asian="14pt" style:font-size-complex="14pt"/>
    </style:style>
    <style:style style:name="P13" style:family="paragraph" style:parent-style-name="Body_5f_Text_5f_NoIndent">
      <style:text-properties style:font-name="Times New Roman1" fo:font-size="14pt" style:font-size-asian="14pt" style:font-size-complex="14pt"/>
    </style:style>
    <style:style style:name="P14" style:family="paragraph" style:parent-style-name="Body_5f_Text_5f_NoIndent">
      <style:text-properties style:font-name="Times New Roman1" fo:font-size="14pt" fo:font-weight="bold" style:font-size-asian="14pt" style:font-weight-asian="bold" style:font-size-complex="14pt" style:font-weight-complex="bold"/>
    </style:style>
    <style:style style:name="P15" style:family="paragraph" style:parent-style-name="Spacer">
      <style:text-properties style:font-name="Times New Roman1" fo:font-size="14pt" fo:font-weight="bold" style:font-size-asian="14pt" style:font-weight-asian="bold" style:font-size-complex="14pt" style:font-weight-complex="bold"/>
    </style:style>
    <style:style style:name="P16" style:family="paragraph" style:parent-style-name="Body_5f_Text_5f_NoIndent">
      <loext:graphic-properties draw:fill="none"/>
      <style:paragraph-properties fo:margin-left="0.0402in" fo:margin-right="0.0402in" fo:margin-top="0.0402in" fo:margin-bottom="0.0402in" style:contextual-spacing="false" fo:text-indent="0in" style:auto-text-indent="false" fo:background-color="transparent"/>
      <style:text-properties style:font-name="Times New Roman1" fo:font-size="14pt" officeooo:paragraph-rsid="001b4a44" style:font-size-asian="14pt" style:font-size-complex="14pt"/>
    </style:style>
    <style:style style:name="P17" style:family="paragraph" style:parent-style-name="Body_5f_Text_5f_NoIndent">
      <loext:graphic-properties draw:fill="none"/>
      <style:paragraph-properties fo:margin-left="0.0402in" fo:margin-right="0.0402in" fo:margin-top="0.0402in" fo:margin-bottom="0.0402in" style:contextual-spacing="false" fo:text-align="right" style:justify-single-word="false" fo:text-indent="0in" style:auto-text-indent="false" fo:background-color="transparent"/>
      <style:text-properties style:font-name="Times New Roman1" fo:font-size="14pt" officeooo:paragraph-rsid="001b4a44" style:font-size-asian="14pt" style:font-size-complex="14pt"/>
    </style:style>
    <style:style style:name="P18" style:family="paragraph" style:parent-style-name="Chapter_5f_Heading">
      <style:text-properties style:font-name="Times New Roman1"/>
    </style:style>
    <style:style style:name="P19" style:family="paragraph" style:parent-style-name="Body_5f_Text">
      <style:paragraph-properties fo:line-height="150%"/>
      <style:text-properties fo:font-size="14pt" officeooo:paragraph-rsid="001b4a44" style:font-size-asian="14pt" style:font-size-complex="14pt"/>
    </style:style>
    <style:style style:name="P20" style:family="paragraph" style:parent-style-name="Body_5f_Text">
      <style:paragraph-properties fo:line-height="150%"/>
      <style:text-properties fo:font-size="14pt" style:font-size-asian="14pt" style:font-size-complex="14pt"/>
    </style:style>
    <style:style style:name="P21" style:family="paragraph" style:parent-style-name="Body_5f_Text_5f_NoIndent">
      <style:text-properties style:font-name="Times New Roman1"/>
    </style:style>
    <style:style style:name="P22" style:family="paragraph" style:parent-style-name="Body_5f_Text">
      <style:text-properties style:font-name="Times New Roman1"/>
    </style:style>
    <style:style style:name="P23" style:family="paragraph" style:parent-style-name="Section_5f_Heading">
      <style:text-properties style:font-name="Times New Roman1"/>
    </style:style>
    <style:style style:name="P24" style:family="paragraph" style:parent-style-name="Bullet">
      <style:text-properties style:font-name="Times New Roman1"/>
    </style:style>
    <style:style style:name="P25" style:family="paragraph" style:parent-style-name="Code_5f_Text">
      <style:text-properties style:font-name="Times New Roman1"/>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2">SUMMER INTERNSHIP REPORT</text:p>
      <text:p text:style-name="P1"/>
      <text:p text:style-name="P3">Submitted by</text:p>
      <text:p text:style-name="P3"/>
      <text:p text:style-name="P4">YUVANESH KS – 513523205060</text:p>
      <text:p text:style-name="P1"/>
      <text:p text:style-name="P5">in partial fulfillment for the award of the degree of</text:p>
      <text:p text:style-name="P6">BACHELOR OF TECHNOLOGY</text:p>
      <text:p text:style-name="P6">IN</text:p>
      <text:p text:style-name="P6">INFORMATION TECHNOLOGY</text:p>
      <text:p text:style-name="P1"/>
      <text:p text:style-name="P1"/>
      <text:p text:style-name="P7">[College LOGO]</text:p>
      <text:p text:style-name="P1"/>
      <text:p text:style-name="P1"/>
      <text:p text:style-name="P1"/>
      <text:p text:style-name="P8">ANNAI MIRA COLLEGE OF ENGINEERING AND TECHNOLOGY</text:p>
      <text:p text:style-name="P9">ARAPAKKAM, RANIPET-632517.</text:p>
      <text:p text:style-name="P9">ANNA UNIVERSITY: CHENNAI 600 025</text:p>
      <text:p text:style-name="P1"/>
      <text:p text:style-name="P6">Nov/Dec 2026</text:p>
      <text:p text:style-name="P10"/>
      <text:p text:style-name="Chapter_5f_Heading">BONAFIDE CERTIFICATE</text:p>
      <text:p text:style-name="P1"/>
      <text:p text:style-name="P11">This is to certify that the Internship Report submitted by Yuvanesh K. S. (Register No: 513523205060) is a record of work done by him on the project "Abyss Chat" as a part of the Summer Internship and submitted during the 2026–2027 academic year, in partial fulfillment of the requirements for the award of the degree of B.Tech Information Technology, at Starvik Solution Pvt. Ltd.</text:p>
      <text:p text:style-name="P12"/>
      <text:p text:style-name="P13">Period of Training: 10 June 2026 to 10 July 2026</text:p>
      <text:p text:style-name="P12"/>
      <text:p text:style-name="P12"/>
      <text:p text:style-name="P14">SIGNATURE</text:p>
      <text:p text:style-name="P12"/>
      <text:p text:style-name="P14">Prof. J. SAVITHIRI M.E., (Ph.D.)</text:p>
      <text:p text:style-name="P14">HEAD OF THE DEPARTMENT</text:p>
      <text:p text:style-name="P14">Dept. of Information Technology</text:p>
      <text:p text:style-name="P14">Annai Mira College of Engineering and Technology</text:p>
      <text:p text:style-name="P15"/>
      <text:p text:style-name="P12"/>
      <text:p text:style-name="P13">Submitted for the internship report review held on _______________.</text:p>
      <text:p text:style-name="P12"/>
      <text:p text:style-name="P12"/>
      <text:p text:style-name="P12"/>
      <table:table table:name="Table1" table:style-name="Table1">
        <table:table-column table:style-name="Table1.A" table:number-columns-repeated="2"/>
        <table:table-row>
          <table:table-cell table:style-name="Table1.A1" office:value-type="string">
            <text:p text:style-name="P16">INTERNAL EXAMINER</text:p>
          </table:table-cell>
          <table:table-cell table:style-name="Table1.A1" office:value-type="string">
            <text:p text:style-name="P17">EXTERNAL EXAMINER</text:p>
          </table:table-cell>
        </table:table-row>
      </table:table>
      <text:p text:style-name="P12"/>
      <text:p text:style-name="P13"/>
      <text:p text:style-name="P10"/>
      <text:p text:style-name="Chapter_5f_Heading">CERTIFICATE</text:p>
      <text:p text:style-name="P1"/>
      <text:p text:style-name="P1"/>
      <text:p text:style-name="Cover_5f_Body">[Insert Internship Certificate Image Here]</text:p>
      <text:p text:style-name="P10"/>
      <text:p text:style-name="P18">ACKNOWLEDGEMENT</text:p>
      <text:p text:style-name="P1"/>
      <text:p text:style-name="P19">Thanks to all the supports from my Team and Friends Who Guided Me Here. </text:p>
      <text:p text:style-name="P19"/>
      <text:p text:style-name="P19">I am conscious about my indebtedness to our honorable Chairman <text:span text:style-name="T1">MR. S. RAMADOSS</text:span>, Secretary <text:span text:style-name="T1">MR. G. THAMOTHIRAN</text:span> and our Principal <text:span text:style-name="T1">DR. T.K. GOPINATHAN</text:span><text:span text:style-name="T1">, Ph.D.,</text:span> and our Vice Principal <text:span text:style-name="T1">DR. D. SARAVANAN, Ph.D.,</text:span> who inspired me to reach greater heights in the pursuits of knowledge.</text:p>
      <text:p text:style-name="P19"/>
      <text:p text:style-name="P20">I proudly express my esteemed gratitude to our Head of the Department <text:span text:style-name="T1">Prof. J. SAVITHIRI M.E., (Ph.D.),</text:span> for her encouragement and assistance towards the completion of the internship.</text:p>
      <text:p text:style-name="P20"/>
      <text:p text:style-name="P20">Special thanks must be mentioned to our internship supervisor <text:span text:style-name="T1">MR. VIVEKANANDAN. M,</text:span> for his expert advice, valuable information and guidance throughout the completion of the internship.</text:p>
      <text:p text:style-name="P20"/>
      <text:p text:style-name="P20">I also express my sincere thanks to all our staff who helped us in the completion of this internship.</text:p>
      <text:p text:style-name="P10"/>
      <text:p text:style-name="P18">TABLE OF CONTENTS</text:p>
      <text:p text:style-name="P1"/>
      <text:p text:style-name="P21">1. Abstract</text:p>
      <text:p text:style-name="P21">2. Introduction</text:p>
      <text:p text:style-name="P21">2.1 Purpose of the Internship</text:p>
      <text:p text:style-name="P21">2.2 Company Profile – Starvik Solution Pvt. Ltd.</text:p>
      <text:p text:style-name="P21">2.3 Duration and Objectives of the Internship</text:p>
      <text:p text:style-name="P21">3. Project Overview – Abyss Chat</text:p>
      <text:p text:style-name="P21">3.1 Problem Statement</text:p>
      <text:p text:style-name="P21">3.2 Scope of the Project</text:p>
      <text:p text:style-name="P21">3.3 Key Features</text:p>
      <text:p text:style-name="P21">4. System Analysis</text:p>
      <text:p text:style-name="P21">4.1 Existing System and Limitations</text:p>
      <text:p text:style-name="P21">4.2 Proposed System</text:p>
      <text:p text:style-name="P21">4.3 Functional Requirements</text:p>
      <text:p text:style-name="P21">4.4 Non-Functional Requirements</text:p>
      <text:p text:style-name="P21">5. System Design</text:p>
      <text:p text:style-name="P21">5.1 System Architecture (Flutter &amp; WebRTC Overview)</text:p>
      <text:p text:style-name="P21">5.2 Use Case Diagrams</text:p>
      <text:p text:style-name="P21">5.3 Data Flow Diagrams (DFD)</text:p>
      <text:p text:style-name="P21">5.4 Network Topology Diagram</text:p>
      <text:p text:style-name="P21">6. Implementation</text:p>
      <text:p text:style-name="P21">6.1 Technologies Used (Flutter, Riverpod, WebRTC)</text:p>
      <text:p text:style-name="P21">6.2 Frontend Development</text:p>
      <text:p text:style-name="P21">6.3 Network &amp; P2P Development</text:p>
      <text:p text:style-name="P21">6.4 Core Features Implemented</text:p>
      <text:p text:style-name="P21">7. Testing</text:p>
      <text:p text:style-name="P21">7.1 Testing Strategy</text:p>
      <text:p text:style-name="P21">7.2 Test Cases</text:p>
      <text:p text:style-name="P21">7.3 Bug Fixes</text:p>
      <text:p text:style-name="P21">8. Results and Discussions</text:p>
      <text:p text:style-name="P21">8.1 Output Screenshots</text:p>
      <text:p text:style-name="P21">8.2 Performance Analysis</text:p>
      <text:p text:style-name="P21">8.3 User Experience Feedback</text:p>
      <text:p text:style-name="P21"><text:soft-page-break/>9. Challenges Faced and Solutions Implemented</text:p>
      <text:p text:style-name="P21">10. Learning Outcomes</text:p>
      <text:p text:style-name="P21">11. Conclusion and Future Enhancements</text:p>
      <text:p text:style-name="P21">12. References</text:p>
      <text:p text:style-name="P21">13. Appendix</text:p>
      <text:p text:style-name="P21">Source Code Links</text:p>
      <text:p text:style-name="P21">Sample Codes of the Application</text:p>
      <text:p text:style-name="P21">14. Declaration</text:p>
      <text:p text:style-name="P10"/>
      <text:p text:style-name="P18">CHAPTER - 1</text:p>
      <text:p text:style-name="P18">ABSTRACT</text:p>
      <text:p text:style-name="P1"/>
      <text:p text:style-name="P22">The "Abyss Chat" is a cross-platform, decentralized peer-to-peer (P2P) messaging and video-calling application built with Flutter. It utilizes WebRTC for true P2P data channels over the internet and leverages Multicast DNS (mDNS) and local TCP sockets for offline, local-network discovery. The system provides end-to-end encrypted messaging, high-definition audio/video calling, and group mesh networking for a seamless and private communication process.</text:p>
      <text:p text:style-name="P10"/>
      <text:p text:style-name="P18">CHAPTER - 2</text:p>
      <text:p text:style-name="P18">INTRODUCTION</text:p>
      <text:p text:style-name="P1"/>
      <text:p text:style-name="P23">2.1 Purpose of the Internship</text:p>
      <text:p text:style-name="P22">The purpose of this internship was to gain real-world experience in cross-platform mobile and web development by building a complete, decentralized communication application from scratch using the Flutter framework and WebRTC.</text:p>
      <text:p text:style-name="P23">2.2 Company Profile – Starvik Solution Pvt. Ltd.</text:p>
      <text:p text:style-name="P22">Starvik Solution Pvt. Ltd. is an innovative technology organization that focuses on developing highly scalable software solutions and providing practical exposure through real-world projects, emphasizing skill development and industry-relevant concepts.</text:p>
      <text:p text:style-name="P23">2.3 Duration and Objectives of the Internship</text:p>
      <text:p text:style-name="P21">Duration: 10 June 2026 – 10 July 2026</text:p>
      <text:p text:style-name="P1"/>
      <text:p text:style-name="P21">Objectives:</text:p>
      <text:p text:style-name="P24">• Learn and apply Flutter and Dart for cross-platform development.</text:p>
      <text:p text:style-name="P24">• Build a fully functional, decentralized P2P chat and calling app.</text:p>
      <text:p text:style-name="P24">• Implement secure data transmission and local network discovery without a central server.</text:p>
      <text:p text:style-name="P10"/>
      <text:p text:style-name="P18">CHAPTER - 3</text:p>
      <text:p text:style-name="P18">PROJECT OVERVIEW – ABYSS CHAT</text:p>
      <text:p text:style-name="P1"/>
      <text:p text:style-name="P23">3.1 Problem Statement</text:p>
      <text:p text:style-name="P22">Traditional messaging applications rely heavily on central servers to route and store messages. This approach introduces significant privacy concerns, potential data mining, and single points of failure. Furthermore, users on the same local network cannot communicate without internet access.</text:p>
      <text:p text:style-name="P23">3.2 Scope of the Project</text:p>
      <text:p text:style-name="P22">To create a completely decentralized P2P application that allows users to send messages and make audio/video calls without central data storage, working seamlessly both over the internet (via WebRTC) and locally offline (via mDNS).</text:p>
      <text:p text:style-name="P23">3.3 Key Features</text:p>
      <text:p text:style-name="P24">• P2P Communication: Direct WebRTC data channels for low-latency messaging and media.</text:p>
      <text:p text:style-name="P24">• Mutual Contacts Only: Strict privacy enforcement, rejecting unknown connections.</text:p>
      <text:p text:style-name="P24">• Local Network Discovery: Uses mDNS to discover peers on the same Wi-Fi offline.</text:p>
      <text:p text:style-name="P24">• Group Chats &amp; Calls: Supports Full Mesh P2P group chats and video calls.</text:p>
      <text:p text:style-name="P24">• Cross-Platform: Runs on Android, iOS, Windows, macOS, Linux, and the Web.</text:p>
      <text:p text:style-name="P10"/>
      <text:p text:style-name="P18">CHAPTER - 4</text:p>
      <text:p text:style-name="P18">SYSTEM ANALYSIS</text:p>
      <text:p text:style-name="P1"/>
      <text:p text:style-name="P23">4.1 Existing System and Limitations</text:p>
      <text:p text:style-name="P22">Existing communication platforms (like WhatsApp or Telegram) have centralized servers, meaning personal data passes through a third party. They also fail to function offline even if users share the same local network.</text:p>
      <text:p text:style-name="P23">4.2 Proposed System</text:p>
      <text:p text:style-name="P22">A decentralized Flutter-based application with an intuitive Material 3 UI, real-time encrypted WebRTC connections, and offline LAN capabilities.</text:p>
      <text:p text:style-name="P23">4.3 Functional Requirements</text:p>
      <text:p text:style-name="P24">• User profile creation and customization (avatar, color).</text:p>
      <text:p text:style-name="P24">• Text messaging, group chats, and audio/video calls.</text:p>
      <text:p text:style-name="P24">• Adding contacts and connection via 6-digit Peer ID or QR Code.</text:p>
      <text:p text:style-name="P23">4.4 Non-Functional Requirements</text:p>
      <text:p text:style-name="P24">• Secure System: End-to-End Encrypted via AES-GCM.</text:p>
      <text:p text:style-name="P24">• Responsive Design: Split-pane layouts for large screens (Desktop/Web).</text:p>
      <text:p text:style-name="P24">• High Performance: Smooth UI micro-animations and optimized video rendering.</text:p>
      <text:p text:style-name="P10"/>
      <text:p text:style-name="P18">CHAPTER - 5</text:p>
      <text:p text:style-name="P18">SYSTEM DESIGN</text:p>
      <text:p text:style-name="P1"/>
      <text:p text:style-name="P23">5.1 System Architecture (Flutter &amp; WebRTC Overview)</text:p>
      <text:p text:style-name="P21">Abyss Chat follows a Feature-First Clean Architecture.</text:p>
      <text:p text:style-name="P24">• Presentation Layer: Riverpod state providers and Flutter widgets.</text:p>
      <text:p text:style-name="P24">• Domain/Data Layer: Controllers handling logic for chat, calling, and contacts.</text:p>
      <text:p text:style-name="P24">• Network Layer: WebRTC PeerDart service for signaling/media, LAN Messenger (mDNS/TCP) for local offline discovery, and Crypto Service for encryption.</text:p>
      <text:p text:style-name="P23">5.2 Use Case Diagrams</text:p>
      <text:p text:style-name="P24">• User → Creates Profile, Adds Contacts.</text:p>
      <text:p text:style-name="P24">• User → Initiates WebRTC Call → Remote Peer.</text:p>
      <text:p text:style-name="P24">• User → Broadcasts mDNS → Local Peer discovers and connects via TCP.</text:p>
      <text:p text:style-name="P23">5.3 Data Flow Diagrams (DFD)</text:p>
      <text:p text:style-name="P21">Send Message: User Types → Controller Encrypts via Crypto Service → Sent via WebRTC Data Channel or TCP Socket → Remote Peer Receives → Decrypts → UI Updates.</text:p>
      <text:p text:style-name="P23">5.4 Network Topology Diagram</text:p>
      <text:p text:style-name="P24">• WebRTC uses a lightweight PeerJS Server strictly for initial SDP/ICE signaling.</text:p>
      <text:p text:style-name="P24">• Once signaling completes, a direct P2P mesh network is established between all participants.</text:p>
      <text:p text:style-name="P10"/>
      <text:p text:style-name="P18">CHAPTER - 6</text:p>
      <text:p text:style-name="P18">IMPLEMENTATION</text:p>
      <text:p text:style-name="P1"/>
      <text:p text:style-name="P23">6.1 Technologies Used</text:p>
      <text:p text:style-name="P24">• Flutter &amp; Dart – Cross-platform UI framework.</text:p>
      <text:p text:style-name="P24">• Riverpod – Reactive state management.</text:p>
      <text:p text:style-name="P24">• WebRTC (flutter_webrtc, peerdart) – Real-time P2P engine.</text:p>
      <text:p text:style-name="P24">• mDNS (nsd) – Local network discovery.</text:p>
      <text:p text:style-name="P24">• AES-GCM (encrypt) – End-to-end encryption.</text:p>
      <text:p text:style-name="P24">• SharedPreferences &amp; path_provider – Persistent local storage.</text:p>
      <text:p text:style-name="P23">6.2 Frontend Development</text:p>
      <text:p text:style-name="P24">• User Interface: Developed using Material 3 guidelines, dynamic color theming, and flutter_animate for transitions.</text:p>
      <text:p text:style-name="P24">• Responsive Layouts: Handled via custom wrappers to switch between mobile stack navigation and desktop split-pane views.</text:p>
      <text:p text:style-name="P23">6.3 Network &amp; P2P Development</text:p>
      <text:p text:style-name="P24">• WebRTC Integration: Built signaling handlers to exchange connection coordinates and establish raw data/media streams.</text:p>
      <text:p text:style-name="P24">• LAN Messenger: Implemented raw TCP sockets that listen for connections discovered via mDNS broadcasts.</text:p>
      <text:p text:style-name="P23">6.4 Core Features Implemented</text:p>
      <text:p text:style-name="P24">• P2P Audio/Video Calling &amp; Messaging.</text:p>
      <text:p text:style-name="P24">• Offline Local Network Discovery.</text:p>
      <text:p text:style-name="P24">• Strict Privacy &amp; Contact Verification.</text:p>
      <text:p text:style-name="P24">• Full Mesh Group Networking.</text:p>
      <text:p text:style-name="P24">• Cross-platform CI/CD Deployment via GitHub Actions.</text:p>
      <text:p text:style-name="P1"/>
      <text:p text:style-name="P23">Sample Code – Frontend: Riverpod State Provider (Chat)</text:p>
      <text:p text:style-name="P1"/>
      <text:p text:style-name="P25">// lib/features/chat/chat_provider.dart</text:p>
      <text:p text:style-name="P25">import 'package:flutter_riverpod/flutter_riverpod.dart';</text:p>
      <text:p text:style-name="P25">import 'package:abyss_chat/network/webrtc_service.dart';</text:p>
      <text:p text:style-name="P25"><text:soft-page-break/></text:p>
      <text:p text:style-name="P25">final chatProvider = StateNotifierProvider&lt;ChatNotifier, List&lt;Message&gt;&gt;((ref) {</text:p>
      <text:p text:style-name="P25">return ChatNotifier(ref.read(webRtcServiceProvider));</text:p>
      <text:p text:style-name="P25">});</text:p>
      <text:p text:style-name="P25"/>
      <text:p text:style-name="P25">class ChatNotifier extends StateNotifier&lt;List&lt;Message&gt;&gt; {</text:p>
      <text:p text:style-name="P25">final WebRTCService _webRTCService;</text:p>
      <text:p text:style-name="P25">ChatNotifier(this._webRTCService) : super([]) {</text:p>
      <text:p text:style-name="P25">_webRTCService.onMessageReceived.listen((msg) {</text:p>
      <text:p text:style-name="P25">state = [...state, msg];</text:p>
      <text:p text:style-name="P25">});</text:p>
      <text:p text:style-name="P25">}</text:p>
      <text:p text:style-name="P25"/>
      <text:p text:style-name="P25">void sendMessage(String text, String peerId) {</text:p>
      <text:p text:style-name="P25">final msg = Message(text: text, isMe: true);</text:p>
      <text:p text:style-name="P25">_webRTCService.sendData(peerId, msg.toJson());</text:p>
      <text:p text:style-name="P25">state = [...state, msg];</text:p>
      <text:p text:style-name="P25">}</text:p>
      <text:p text:style-name="P25">}</text:p>
      <text:p text:style-name="P1"/>
      <text:p text:style-name="P23">Sample Code – Network Layer: TCP Socket (LAN Messenger)</text:p>
      <text:p text:style-name="P1"/>
      <text:p text:style-name="P25">// lib/network/lan_messenger.dart</text:p>
      <text:p text:style-name="P25">import 'dart:io';</text:p>
      <text:p text:style-name="P25"/>
      <text:p text:style-name="P25">class LANMessenger {</text:p>
      <text:p text:style-name="P25">ServerSocket? _serverSocket;</text:p>
      <text:p text:style-name="P25">Future&lt;void&gt; startListening(int port) async {</text:p>
      <text:p text:style-name="P25">_serverSocket = await ServerSocket.bind(InternetAddress.anyIPv4, port);</text:p>
      <text:p text:style-name="P25">_serverSocket!.listen((Socket client) {</text:p>
      <text:p text:style-name="P25">client.listen((data) {</text:p>
      <text:p text:style-name="P25">final decryptedData = CryptoService.decrypt(data);</text:p>
      <text:p text:style-name="P25">// Handle incoming local message</text:p>
      <text:p text:style-name="P25">});</text:p>
      <text:p text:style-name="P25">});</text:p>
      <text:p text:style-name="P25">}</text:p>
      <text:p text:style-name="P25">}</text:p>
      <text:p text:style-name="P10"/>
      <text:p text:style-name="P18">CHAPTER - 7</text:p>
      <text:p text:style-name="P18">TESTING</text:p>
      <text:p text:style-name="P1"/>
      <text:p text:style-name="P23">7.1 Testing Strategy</text:p>
      <text:p text:style-name="P24">• Manual Testing: Performed across different network conditions (LAN offline, high-latency 4G, cross-platform interactions between Web and Android).</text:p>
      <text:p text:style-name="P24">• WebRTC NAT Testing: Handled edge cases involving local testing on modern browsers obfuscating .local IPs.</text:p>
      <text:p text:style-name="P23">7.2 Test Cases</text:p>
      <text:p text:style-name="P24">• Peer discovery on the same Wi-Fi without internet.</text:p>
      <text:p text:style-name="P24">• Successful WebRTC handshake and video stream establishment over 4G.</text:p>
      <text:p text:style-name="P24">• Rejection of incoming connections from unsaved Peer IDs.</text:p>
      <text:p text:style-name="P23">7.3 Bug Fixes</text:p>
      <text:p text:style-name="P24">• Fixed rigid video grid layouts by using dynamic Flex/Wrap for different monitor sizes.</text:p>
      <text:p text:style-name="P24">• Handled Kotlin plugin registrant issues on older Android builds via Gradle reflection.</text:p>
      <text:p text:style-name="P10"/>
      <text:p text:style-name="P18">CHAPTER - 8</text:p>
      <text:p text:style-name="P18">RESULTS AND SCREENSHOTS</text:p>
      <text:p text:style-name="P1"/>
      <text:p text:style-name="P23">8.1 Output Screenshots</text:p>
      <text:p text:style-name="P7">[Insert Application Screenshots Here]</text:p>
      <text:p text:style-name="P23">8.2 Performance Analysis</text:p>
      <text:p text:style-name="P24">• The P2P Data Channels provide sub-100ms latency for text messages.</text:p>
      <text:p text:style-name="P24">• The Full Mesh video calling performs smoothly for up to 10 simultaneous HD streams on standard devices.</text:p>
      <text:p text:style-name="P23">8.3 User Experience Feedback</text:p>
      <text:p text:style-name="P24">• Users found the Material 3 UI vibrant and highly responsive.</text:p>
      <text:p text:style-name="P24">• The ability to connect completely offline on a local network was highly praised.</text:p>
      <text:p text:style-name="P10"/>
      <text:p text:style-name="P18">CHAPTER - 9</text:p>
      <text:p text:style-name="P18">CHALLENGES FACED AND SOLUTIONS IMPLEMENTED</text:p>
      <text:p text:style-name="P1"/>
      <text:p text:style-name="P23">Challenge 1: Establishing connections without a central server.</text:p>
      <text:p text:style-name="P21">Solution: Used a PeerJS server solely for the initial SDP/ICE handshake; data channels handle the rest directly.</text:p>
      <text:p text:style-name="P23">Challenge 2: Storage limitations on the Web platform.</text:p>
      <text:p text:style-name="P21">Solution: Abstracted the storage service to gracefully fall back to SharedPreferences on Web, while using encrypted file streams on Native.</text:p>
      <text:p text:style-name="P23">Challenge 3: Local Network Testing failures due to browser mDNS obfuscation.</text:p>
      <text:p text:style-name="P21">Solution: Documented the need to disable media.peerconnection.ice.obfuscate_host_addresses in Firefox during specific localhost testing scenarios.</text:p>
      <text:p text:style-name="P10"/>
      <text:p text:style-name="P18">CHAPTER - 10</text:p>
      <text:p text:style-name="P18">LEARNING OUTCOMES</text:p>
      <text:p text:style-name="P1"/>
      <text:p text:style-name="P24">• Gained hands-on experience in cross-platform development using Flutter.</text:p>
      <text:p text:style-name="P24">• Deepened understanding of Peer-to-Peer networking, WebRTC, and mDNS.</text:p>
      <text:p text:style-name="P24">• Learned how to implement End-to-End Encryption and manage application state reactively using Riverpod.</text:p>
      <text:p text:style-name="P24">• Acquired skills in setting up automated CI/CD pipelines via GitHub Actions.</text:p>
      <text:p text:style-name="P10"/>
      <text:p text:style-name="P18">CHAPTER - 11</text:p>
      <text:p text:style-name="P18">CONCLUSION AND FUTURE ENHANCEMENTS</text:p>
      <text:p text:style-name="P1"/>
      <text:p text:style-name="P23">Conclusion</text:p>
      <text:p text:style-name="P22">The Abyss Chat application successfully bridges the gap in decentralized communication, providing a secure, serverless, and offline-capable platform. It has significantly improved my practical knowledge of full-stack mobile development, real-time networking, and complex state management.</text:p>
      <text:p text:style-name="P23">Future Enhancements</text:p>
      <text:p text:style-name="P24">• Implement an optional Selective Forwarding Unit (SFU) for large group calls (10+ users).</text:p>
      <text:p text:style-name="P24">• Add support for chunked file transfers (large videos and documents) over WebRTC.</text:p>
      <text:p text:style-name="P24">• Improve background keep-alive execution for mDNS broadcasts on iOS/Android.</text:p>
      <text:p text:style-name="P10"/>
      <text:p text:style-name="P18">CHAPTER - 12</text:p>
      <text:p text:style-name="P18">REFERENCES</text:p>
      <text:p text:style-name="P1"/>
      <text:p text:style-name="P21">1. Flutter Documentation – https://flutter.dev/docs</text:p>
      <text:p text:style-name="P21">2. WebRTC API – https://webrtc.org/</text:p>
      <text:p text:style-name="P21">3. Riverpod State Management – https://riverpod.dev/</text:p>
      <text:p text:style-name="P21">4. PeerJS Signaling – https://peerjs.com/</text:p>
      <text:p text:style-name="P10"/>
      <text:p text:style-name="P18">CHAPTER - 13</text:p>
      <text:p text:style-name="P18">APPENDIX</text:p>
      <text:p text:style-name="P1"/>
      <text:p text:style-name="P23">Source Code Links</text:p>
      <text:p text:style-name="P21">GitHub Repository: https://github.com/North-Abyss/abyss_chat</text:p>
      <text:p text:style-name="P21">Live Web App: https://north-abyss.github.io/abyss_chat/</text:p>
      <text:p text:style-name="P10"/>
      <text:p text:style-name="P18">CHAPTER - 14</text:p>
      <text:p text:style-name="P18">DECLARATION</text:p>
      <text:p text:style-name="P1"/>
      <text:p text:style-name="P22">I hereby declare that this internship report titled "Abyss Chat" is based on my own work carried out during the internship at Starvik Solution Pvt. Ltd. from 10 June 2026 to 10 July 2026. All the information and data presented here are true to the best of my knowledge and belief.</text:p>
      <text:p text:style-name="P1"/>
      <text:p text:style-name="P1"/>
      <text:p text:style-name="P1"/>
      <text:p text:style-name="P21">Signature:</text:p>
      <text:p text:style-name="P1"/>
      <text:p text:style-name="P21">Yuvanesh K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ourier New" svg:font-family="'Courier New'"/>
    <style:font-face style:name="DejaVu Sans" svg:font-family="'DejaVu Sans'" style:font-family-generic="system"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Times New Roman" svg:font-family="'Times New Roman'"/>
    <style:font-face style:name="Times New Roman1"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DejaVu Sans" style:font-size-asian="12pt" style:language-asian="none" style:country-asian="none" style:font-family-complex="'Noto Sans'" style:font-family-generic-complex="system" style:font-pitch-complex="variabl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DejaVu Sans" style:font-size-asian="12pt" style:language-asian="zh" style:country-asian="CN" style:font-name-complex="Noto Sans Arabic"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Cover_5f_Title" style:display-name="Cover_Title" style:family="paragraph">
      <style:paragraph-properties fo:margin-top="0in" fo:margin-bottom="0.1181in" style:contextual-spacing="false" fo:text-align="center" style:justify-single-word="false"/>
      <style:text-properties style:font-name="Times New Roman" fo:font-family="'Times New Roman'" fo:font-size="20pt" fo:font-weight="bold"/>
    </style:style>
    <style:style style:name="Cover_5f_Sub" style:display-name="Cover_Sub" style:family="paragraph">
      <style:paragraph-properties fo:margin-top="0in" fo:margin-bottom="0.0783in" style:contextual-spacing="false" fo:text-align="center" style:justify-single-word="false"/>
      <style:text-properties style:font-name="Times New Roman" fo:font-family="'Times New Roman'" fo:font-size="14pt"/>
    </style:style>
    <style:style style:name="Cover_5f_Body" style:display-name="Cover_Body" style:family="paragraph">
      <style:paragraph-properties fo:margin-top="0in" fo:margin-bottom="0.0591in" style:contextual-spacing="false" fo:text-align="center" style:justify-single-word="false"/>
      <style:text-properties style:font-name="Times New Roman1" fo:font-family="'Times New Roman'" style:font-family-generic="roman" fo:font-size="14pt" style:font-size-asian="14pt" style:font-size-complex="14pt"/>
    </style:style>
    <style:style style:name="Chapter_5f_Heading" style:display-name="Chapter_Heading" style:family="paragraph">
      <loext:graphic-properties draw:fill="none"/>
      <style:paragraph-properties fo:margin-left="0.0402in" fo:margin-right="0.0402in" fo:margin-top="0.1402in" fo:margin-bottom="0.1402in" style:contextual-spacing="false" fo:text-align="center" style:justify-single-word="false" fo:text-indent="0in" style:auto-text-indent="false" fo:background-color="transparent"/>
      <style:text-properties style:font-name="Times New Roman1" fo:font-family="'Times New Roman'" style:font-family-generic="roman" fo:font-size="20pt" fo:font-weight="bold" style:font-size-asian="20pt" style:font-size-complex="20pt"/>
    </style:style>
    <style:style style:name="Section_5f_Heading" style:display-name="Section_Heading" style:family="paragraph">
      <style:paragraph-properties fo:margin-top="0.1575in" fo:margin-bottom="0.0984in" style:contextual-spacing="false" fo:text-align="left" style:justify-single-word="false"/>
      <style:text-properties style:font-name="Times New Roman" fo:font-family="'Times New Roman'" fo:font-size="12pt" fo:font-weight="bold"/>
    </style:style>
    <style:style style:name="Body_5f_Text" style:display-name="Body_Text" style:family="paragraph">
      <loext:graphic-properties draw:fill="none"/>
      <style:paragraph-properties fo:margin-left="0.1in" fo:margin-right="0.1in" fo:margin-top="0.0402in" fo:margin-bottom="0.0402in" style:contextual-spacing="false" fo:text-align="justify" style:justify-single-word="false" fo:text-indent="0.5in" style:auto-text-indent="false" fo:background-color="transparent"/>
      <style:text-properties style:font-name="Times New Roman1" fo:font-family="'Times New Roman'" style:font-family-generic="roman" fo:font-size="14pt" style:font-size-asian="14pt" style:font-size-complex="14pt"/>
    </style:style>
    <style:style style:name="Body_5f_Text_5f_NoIndent" style:display-name="Body_Text_NoIndent" style:family="paragraph">
      <style:paragraph-properties fo:margin-top="0in" fo:margin-bottom="0.0783in" style:contextual-spacing="false" fo:text-align="justify" style:justify-single-word="false"/>
      <style:text-properties style:font-name="Times New Roman" fo:font-family="'Times New Roman'" fo:font-size="12pt"/>
    </style:style>
    <style:style style:name="Bullet" style:family="paragraph">
      <style:paragraph-properties fo:margin-left="0.4925in" fo:margin-top="0in" fo:margin-bottom="0.0398in" style:contextual-spacing="false" fo:text-align="justify" style:justify-single-word="false"/>
      <style:text-properties style:font-name="Times New Roman" fo:font-family="'Times New Roman'" fo:font-size="12pt"/>
    </style:style>
    <style:style style:name="Code_5f_Text" style:display-name="Code_Text" style:family="paragraph">
      <style:paragraph-properties fo:margin-left="0.4925in" fo:margin-top="0.0398in" fo:margin-bottom="0.0398in" style:contextual-spacing="false"/>
      <style:text-properties style:font-name="Courier New" fo:font-family="'Courier New'" fo:font-size="10pt"/>
    </style:style>
    <style:style style:name="Spacer" style:family="paragraph">
      <style:paragraph-properties fo:margin-top="0in" fo:margin-bottom="0.1965in" style:contextual-spacing="false"/>
      <style:text-properties fo:font-size="6pt"/>
    </style:style>
    <style:style style:name="Page_5f_Break" style:display-name="Page_Break" style:family="paragraph">
      <style:paragraph-properties fo:break-before="page"/>
      <style:text-properties fo:font-size="1pt"/>
    </style:style>
    <style:style style:name="Header_20_and_20_Footer" style:display-name="Header and Footer" style:family="paragraph" style:parent-style-name="Standard" style:class="extra">
      <style:paragraph-properties text:number-lines="false" text:line-number="0">
        <style:tab-stops>
          <style:tab-stop style:position="3.3453in" style:type="center"/>
          <style:tab-stop style:position="6.690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53in" style:type="center"/>
          <style:tab-stop style:position="6.690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9in" fo:margin-bottom="0.789in" fo:margin-left="0.789in" fo:margin-right="0.789in" fo:border="1.5pt double #000000" style:border-line-width="0.0071in 0.0071in 0.0071in" fo:padding="0.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21</text:page-number><text:bookmark-end text:name="PageNumWizard_FOOTER_Default Page Style3"/></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6.2.4.2$Linux_X86_64 LibreOffice_project/620$Build-2</meta:generator>
    <dc:date>2026-07-17T16:55:29.731694479</dc:date>
    <dc:creator>Yuvanesh KS</dc:creator>
    <meta:editing-duration>PT4M</meta:editing-duration>
    <meta:editing-cycles>1</meta:editing-cycles>
    <meta:document-statistic meta:table-count="1" meta:image-count="0" meta:object-count="0" meta:page-count="21" meta:paragraph-count="246" meta:word-count="1809" meta:character-count="12779" meta:non-whitespace-character-count="11198"/>
  </office:meta>
</office:document-meta>
</file>